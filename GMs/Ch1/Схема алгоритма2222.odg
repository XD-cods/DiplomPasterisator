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butt" draw:fill="non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25cm" svg:stroke-color="#000000" svg:stroke-opacity="100%" draw:stroke-linejoin="miter" svg:stroke-linecap="butt" draw:fill="none" fo:padding-top="0.137cm" fo:padding-bottom="0.137cm" fo:padding-left="0.262cm" fo:padding-right="0.262cm" loext:decorative="false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fill="solid" draw:fill-color="#ffffff" draw:shadow="hidden" loext:decorative="false"/>
    </style:style>
    <style:style style:name="gr1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12" style:family="graphic" style:parent-style-name="standard">
      <style:graphic-properties draw:stroke="none" draw:fill="none" draw:textarea-vertical-align="middle" fo:min-height="1.258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097cm" fo:min-width="5.292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2.29cm" fo:min-width="5.85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2.35cm" fo:min-width="4.498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d7"/>
      <style:paragraph-properties fo:text-align="center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Arial" fo:font-size="18pt" fo:font-style="italic" style:font-name-asian="Arial" style:font-size-asian="18pt" style:font-style-asian="italic" style:font-name-complex="Arial" style:font-size-complex="18pt" style:font-style-complex="italic"/>
    </style:style>
    <style:style style:name="T3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ма а" draw:style-name="dp1" draw:master-page-name="PM0">
        <draw:line draw:style-name="gr1" draw:text-style-name="P1" draw:layer="layout" svg:x1="2cm" svg:y1="1.2cm" svg:x2="2cm" svg:y2="58.9cm">
          <text:p/>
        </draw:line>
        <draw:line draw:style-name="gr1" draw:text-style-name="P1" draw:layer="layout" svg:x1="2cm" svg:y1="0.5cm" svg:x2="83.6cm" svg:y2="0.5cm">
          <text:p/>
        </draw:line>
        <draw:line draw:style-name="gr1" draw:text-style-name="P1" draw:layer="layout" svg:x1="83.6cm" svg:y1="58.899cm" svg:x2="83.6cm" svg:y2="0.5cm">
          <text:p/>
        </draw:line>
        <draw:line draw:style-name="gr1" draw:text-style-name="P1" draw:layer="layout" svg:x1="2cm" svg:y1="58.9cm" svg:x2="83.6cm" svg:y2="58.9cm">
          <text:p/>
        </draw:line>
        <draw:frame draw:style-name="gr2" draw:text-style-name="P1" draw:layer="layout" svg:width="1.85cm" svg:height="0.71cm" svg:x="80.1cm" svg:y="56.295cm">
          <draw:text-box>
            <text:p text:style-name="P2"><text:span text:style-name="T1">Лист </text:span></text:p>
          </draw:text-box>
        </draw:frame>
        <draw:frame draw:style-name="gr2" draw:text-style-name="P1" draw:layer="layout" svg:width="1.66cm" svg:height="0.71cm" svg:x="81.94cm" svg:y="56.295cm">
          <draw:text-box>
            <text:p text:style-name="P2"><text:span text:style-name="T1">Листов </text:span></text:p>
          </draw:text-box>
        </draw:frame>
        <draw:frame draw:style-name="gr3" draw:text-style-name="P1" draw:layer="layout" svg:width="5cm" svg:height="1.5cm" svg:x="78.6cm" svg:y="57.4cm">
          <draw:text-box>
            <text:p text:style-name="P2"><text:span text:style-name="T2">УО «БрГТУ»</text:span></text:p>
          </draw:text-box>
        </draw:frame>
        <draw:frame draw:style-name="gr2" draw:text-style-name="P1" draw:layer="layout" svg:width="1.5cm" svg:height="0.71cm" svg:x="78.6cm" svg:y="56.295cm">
          <draw:text-box>
            <text:p text:style-name="P2"><text:span text:style-name="T1">Лит</text:span></text:p>
          </draw:text-box>
        </draw:frame>
        <draw:frame draw:style-name="gr4" draw:text-style-name="P1" draw:layer="layout" svg:width="0.7cm" svg:height="0.71cm" svg:x="65.1cm" svg:y="55.795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1cm" svg:height="0.71cm" svg:x="65.8cm" svg:y="55.795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3cm" svg:height="0.71cm" svg:x="66.8cm" svg:y="55.795cm">
          <draw:text-box>
            <text:p text:style-name="P2"><text:span text:style-name="T1">№ докум.</text:span></text:p>
          </draw:text-box>
        </draw:frame>
        <draw:frame draw:style-name="gr2" draw:text-style-name="P1" draw:layer="layout" svg:width="1.5cm" svg:height="0.71cm" svg:x="69.1cm" svg:y="55.795cm">
          <draw:text-box>
            <text:p text:style-name="P2"><text:span text:style-name="T1">Подп.</text:span></text:p>
          </draw:text-box>
        </draw:frame>
        <draw:frame draw:style-name="gr4" draw:text-style-name="P1" draw:layer="layout" svg:width="1cm" svg:height="0.71cm" svg:x="70.6cm" svg:y="55.795cm">
          <draw:text-box>
            <text:p text:style-name="P2"><text:span text:style-name="T1">Дата</text:span></text:p>
          </draw:text-box>
        </draw:frame>
        <draw:frame draw:style-name="gr2" draw:text-style-name="P1" draw:layer="layout" svg:width="1.7cm" svg:height="0.71cm" svg:x="65.1cm" svg:y="56.295cm">
          <draw:text-box>
            <text:p text:style-name="P3"><text:span text:style-name="T1">Разраб.</text:span></text:p>
          </draw:text-box>
        </draw:frame>
        <draw:frame draw:style-name="gr2" draw:text-style-name="P1" draw:layer="layout" svg:width="1.7cm" svg:height="0.71cm" svg:x="65.1cm" svg:y="56.795cm">
          <draw:text-box>
            <text:p text:style-name="P3"><text:span text:style-name="T1">Пров.</text:span></text:p>
          </draw:text-box>
        </draw:frame>
        <draw:frame draw:style-name="gr5" draw:text-style-name="P1" draw:layer="layout" svg:width="1.7cm" svg:height="0.71cm" svg:x="65.1cm" svg:y="57.795cm">
          <draw:text-box>
            <text:p text:style-name="P3"><text:span text:style-name="T1">Н.Контр.</text:span></text:p>
          </draw:text-box>
        </draw:frame>
        <draw:frame draw:style-name="gr2" draw:text-style-name="P1" draw:layer="layout" svg:width="1.7cm" svg:height="0.71cm" svg:x="65.1cm" svg:y="58.295cm">
          <draw:text-box>
            <text:p text:style-name="P3"><text:span text:style-name="T1">Утв.</text:span></text:p>
          </draw:text-box>
        </draw:frame>
        <draw:frame draw:style-name="gr2" draw:text-style-name="P1" draw:layer="layout" svg:width="2.7cm" svg:height="0.71cm" svg:x="66.8cm" svg:y="58.295cm">
          <draw:text-box>
            <text:p text:style-name="P3"><text:span text:style-name="T1">Головко В.А.</text:span></text:p>
          </draw:text-box>
        </draw:frame>
        <draw:frame draw:style-name="gr2" draw:text-style-name="P1" draw:layer="layout" svg:width="1.85cm" svg:height="0.71cm" svg:x="80.1cm" svg:y="56.795cm">
          <draw:text-box>
            <text:p text:style-name="P2"><text:span text:style-name="T1">1</text:span></text:p>
          </draw:text-box>
        </draw:frame>
        <draw:frame draw:style-name="gr2" draw:text-style-name="P1" draw:layer="layout" svg:width="1.66cm" svg:height="0.71cm" svg:x="81.94cm" svg:y="56.795cm">
          <draw:text-box>
            <text:p text:style-name="P2"><text:span text:style-name="T1">1</text:span></text:p>
          </draw:text-box>
        </draw:frame>
        <draw:frame draw:style-name="gr4" draw:text-style-name="P1" draw:layer="layout" svg:width="0.5cm" svg:height="0.71cm" svg:x="78.6cm" svg:y="56.795cm">
          <draw:text-box>
            <text:p text:style-name="P2"><text:span text:style-name="T1">Д</text:span></text:p>
          </draw:text-box>
        </draw:frame>
        <draw:line draw:style-name="gr1" draw:text-style-name="P1" draw:layer="layout" svg:x1="78.6cm" svg:y1="58.899cm" svg:x2="78.6cm" svg:y2="56.4cm">
          <text:p/>
        </draw:line>
        <draw:line draw:style-name="gr1" draw:text-style-name="P1" draw:layer="layout" svg:x1="71.6cm" svg:y1="58.899cm" svg:x2="71.6cm" svg:y2="54.9cm">
          <text:p/>
        </draw:line>
        <draw:line draw:style-name="gr6" draw:text-style-name="P1" draw:layer="layout" svg:x1="65.1cm" svg:y1="58.4cm" svg:x2="71.6cm" svg:y2="58.4cm">
          <text:p/>
        </draw:line>
        <draw:line draw:style-name="gr6" draw:text-style-name="P1" draw:layer="layout" svg:x1="71.6cm" svg:y1="57.9cm" svg:x2="65.1cm" svg:y2="57.9cm">
          <text:p/>
        </draw:line>
        <draw:line draw:style-name="gr1" draw:text-style-name="P1" draw:layer="layout" svg:x1="83.599cm" svg:y1="57.4cm" svg:x2="78.6cm" svg:y2="57.4cm">
          <text:p/>
        </draw:line>
        <draw:line draw:style-name="gr6" draw:text-style-name="P1" draw:layer="layout" svg:x1="71.6cm" svg:y1="57.4cm" svg:x2="65.1cm" svg:y2="57.4cm">
          <text:p/>
        </draw:line>
        <draw:line draw:style-name="gr1" draw:text-style-name="P1" draw:layer="layout" svg:x1="83.599cm" svg:y1="56.4cm" svg:x2="65.1cm" svg:y2="56.4cm">
          <text:p/>
        </draw:line>
        <draw:line draw:style-name="gr1" draw:text-style-name="P1" draw:layer="layout" svg:x1="65.1cm" svg:y1="55.9cm" svg:x2="71.6cm" svg:y2="55.9cm">
          <text:p/>
        </draw:line>
        <draw:line draw:style-name="gr1" draw:text-style-name="P1" draw:layer="layout" svg:x1="65.1cm" svg:y1="54.9cm" svg:x2="83.599cm" svg:y2="54.9cm">
          <text:p/>
        </draw:line>
        <draw:line draw:style-name="gr6" draw:text-style-name="P1" draw:layer="layout" svg:x1="65.1cm" svg:y1="56.9cm" svg:x2="71.6cm" svg:y2="56.9cm">
          <text:p/>
        </draw:line>
        <draw:line draw:style-name="gr1" draw:text-style-name="P1" draw:layer="layout" svg:x1="70.6cm" svg:y1="54.9cm" svg:x2="70.6cm" svg:y2="58.899cm">
          <text:p/>
        </draw:line>
        <draw:line draw:style-name="gr1" draw:text-style-name="P1" draw:layer="layout" svg:x1="69.1cm" svg:y1="54.9cm" svg:x2="69.1cm" svg:y2="58.899cm">
          <text:p/>
        </draw:line>
        <draw:line draw:style-name="gr1" draw:text-style-name="P1" draw:layer="layout" svg:x1="65.8cm" svg:y1="54.9cm" svg:x2="65.8cm" svg:y2="56.399cm">
          <text:p/>
        </draw:line>
        <draw:line draw:style-name="gr1" draw:text-style-name="P1" draw:layer="layout" svg:x1="66.8cm" svg:y1="54.9cm" svg:x2="66.8cm" svg:y2="58.899cm">
          <text:p/>
        </draw:line>
        <draw:line draw:style-name="gr1" draw:text-style-name="P1" draw:layer="layout" svg:x1="78.6cm" svg:y1="56.9cm" svg:x2="83.599cm" svg:y2="56.9cm">
          <text:p/>
        </draw:line>
        <draw:polyline draw:style-name="gr1" draw:text-style-name="P1" draw:layer="layout" svg:width="0cm" svg:height="0.998cm" svg:x="81.95cm" svg:y="56.4cm" svg:viewBox="0 0 0 999" draw:points="0,0 0,428 0,999">
          <text:p/>
        </draw:polyline>
        <draw:line draw:style-name="gr1" draw:text-style-name="P1" draw:layer="layout" svg:x1="80.1cm" svg:y1="56.4cm" svg:x2="80.1cm" svg:y2="57.399cm">
          <text:p/>
        </draw:line>
        <draw:line draw:style-name="gr6" draw:text-style-name="P1" draw:layer="layout" svg:x1="71.6cm" svg:y1="55.4cm" svg:x2="65.1cm" svg:y2="55.4cm">
          <text:p/>
        </draw:line>
        <draw:line draw:style-name="gr6" draw:text-style-name="P1" draw:layer="layout" svg:x1="79.1cm" svg:y1="56.9cm" svg:x2="79.1cm" svg:y2="57.4cm">
          <text:p/>
        </draw:line>
        <draw:line draw:style-name="gr6" draw:text-style-name="P1" draw:layer="layout" svg:x1="79.6cm" svg:y1="56.9cm" svg:x2="79.6cm" svg:y2="57.4cm">
          <text:p/>
        </draw:line>
        <draw:line draw:style-name="gr1" draw:text-style-name="P1" draw:layer="layout" svg:x1="65.1cm" svg:y1="54.9cm" svg:x2="65.1cm" svg:y2="58.899cm">
          <text:p/>
        </draw:line>
        <draw:frame draw:style-name="gr3" draw:text-style-name="P1" draw:layer="layout" svg:width="12cm" svg:height="1.5cm" svg:x="71.5cm" svg:y="54.9cm">
          <draw:text-box>
            <text:p text:style-name="P2"><text:span text:style-name="T2">ДП.АС59.200043-05 93 00</text:span></text:p>
          </draw:text-box>
        </draw:frame>
        <draw:frame draw:style-name="gr7" draw:text-style-name="P1" draw:layer="layout" svg:width="7cm" svg:height="2.5cm" svg:x="71.6cm" svg:y="56.4cm">
          <draw:text-box>
            <text:p text:style-name="P2"><text:span text:style-name="T3">Разработка модуля прогнозирования данных временных рядов технологического процесса пастеризационной установки</text:span></text:p>
          </draw:text-box>
        </draw:frame>
        <draw:frame draw:style-name="gr2" draw:text-style-name="P1" draw:layer="layout" svg:width="2.7cm" svg:height="0.71cm" svg:x="66.8cm" svg:y="57.795cm">
          <draw:text-box>
            <text:p text:style-name="P3"><text:span text:style-name="T1">Булей Е.В.</text:span></text:p>
          </draw:text-box>
        </draw:frame>
        <draw:frame draw:style-name="gr2" draw:text-style-name="P1" draw:layer="layout" svg:width="2.75cm" svg:height="0.71cm" svg:x="66.8cm" svg:y="56.795cm">
          <draw:text-box>
            <text:p text:style-name="P3"><text:span text:style-name="T1">Иванюк Д.С.</text:span></text:p>
          </draw:text-box>
        </draw:frame>
        <draw:g draw:style-name="gr8">
          <draw:g draw:style-name="gr9">
            <draw:polygon draw:style-name="gr10" draw:text-style-name="P4" draw:layer="layout" svg:width="7cm" svg:height="1.4cm" svg:x="2cm" svg:y="0.5cm" svg:viewBox="0 0 7001 1401" draw:points="7001,0 0,0 0,1401 7001,1400">
              <text:p/>
            </draw:polygon>
            <draw:polygon draw:style-name="gr11" draw:text-style-name="P1" draw:layer="layout" svg:width="7cm" svg:height="1.4cm" svg:x="2cm" svg:y="0.5cm" svg:viewBox="0 0 7001 1401" draw:points="7001,0 0,0 0,1401 7001,1400">
              <text:p/>
            </draw:polygon>
          </draw:g>
          <draw:frame draw:style-name="gr12" draw:text-style-name="P1" draw:layer="layout" svg:width="7cm" svg:height="1.4cm" draw:transform="rotate (-3.14159265358979) translate (9cm 1.9cm)">
            <draw:text-box>
              <text:p text:style-name="P2"><text:span text:style-name="T4">ДП.АС59.200043-05 93 00</text:span></text:p>
            </draw:text-box>
          </draw:frame>
        </draw:g>
        <draw:frame draw:style-name="gr2" draw:text-style-name="P1" draw:layer="layout" svg:width="2.75cm" svg:height="0.71cm" svg:x="66.8cm" svg:y="56.295cm">
          <draw:text-box>
            <text:p text:style-name="P3"><text:span text:style-name="T1">Абоимов И.В.</text:span></text:p>
          </draw:text-box>
        </draw:frame>
        <draw:custom-shape draw:style-name="gr13" draw:text-style-name="P6" draw:layer="layout" svg:width="6.35cm" svg:height="1.905cm" svg:x="15.875cm" svg:y="6.985cm">
          <text:p text:style-name="P5">Начало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4" draw:text-style-name="P6" draw:layer="layout" svg:width="6.35cm" svg:height="2.54cm" svg:x="15.875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.937cm" svg:height="4.128cm" svg:x="14.288cm" svg:y="10.477cm">
          <text:p/>
          <draw:enhanced-geometry svg:viewBox="0 0 21600 21600" draw:glue-points="?f6 0 10800 ?f8 ?f11 10800 ?f9 21600 10800 ?f10 ?f5 10800" draw:text-areas="?f3 ?f3 ?f4 ?f4" draw:type="parallelogram" draw:modifiers="4228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</draw:page>
      <draw:page draw:name="page2" draw:style-name="dp1" draw:master-page-name="PM0">
        <draw:line draw:style-name="gr1" draw:text-style-name="P1" draw:layer="layout" svg:x1="2cm" svg:y1="1.2cm" svg:x2="2cm" svg:y2="58.9cm">
          <text:p/>
        </draw:line>
        <draw:line draw:style-name="gr1" draw:text-style-name="P1" draw:layer="layout" svg:x1="2cm" svg:y1="0.5cm" svg:x2="83.6cm" svg:y2="0.5cm">
          <text:p/>
        </draw:line>
        <draw:line draw:style-name="gr1" draw:text-style-name="P1" draw:layer="layout" svg:x1="83.6cm" svg:y1="58.899cm" svg:x2="83.6cm" svg:y2="0.5cm">
          <text:p/>
        </draw:line>
        <draw:line draw:style-name="gr1" draw:text-style-name="P1" draw:layer="layout" svg:x1="2cm" svg:y1="58.9cm" svg:x2="83.6cm" svg:y2="58.9cm">
          <text:p/>
        </draw:line>
        <draw:frame draw:style-name="gr2" draw:text-style-name="P1" draw:layer="layout" svg:width="1.85cm" svg:height="0.71cm" svg:x="80.1cm" svg:y="56.295cm">
          <draw:text-box>
            <text:p text:style-name="P2"><text:span text:style-name="T1">Лист </text:span></text:p>
          </draw:text-box>
        </draw:frame>
        <draw:frame draw:style-name="gr2" draw:text-style-name="P1" draw:layer="layout" svg:width="1.66cm" svg:height="0.71cm" svg:x="81.94cm" svg:y="56.295cm">
          <draw:text-box>
            <text:p text:style-name="P2"><text:span text:style-name="T1">Листов </text:span></text:p>
          </draw:text-box>
        </draw:frame>
        <draw:frame draw:style-name="gr3" draw:text-style-name="P1" draw:layer="layout" svg:width="5cm" svg:height="1.5cm" svg:x="78.6cm" svg:y="57.4cm">
          <draw:text-box>
            <text:p text:style-name="P2"><text:span text:style-name="T2">УО «БрГТУ»</text:span></text:p>
          </draw:text-box>
        </draw:frame>
        <draw:frame draw:style-name="gr2" draw:text-style-name="P1" draw:layer="layout" svg:width="1.5cm" svg:height="0.71cm" svg:x="78.6cm" svg:y="56.295cm">
          <draw:text-box>
            <text:p text:style-name="P2"><text:span text:style-name="T1">Лит</text:span></text:p>
          </draw:text-box>
        </draw:frame>
        <draw:frame draw:style-name="gr4" draw:text-style-name="P1" draw:layer="layout" svg:width="0.7cm" svg:height="0.71cm" svg:x="65.1cm" svg:y="55.795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1cm" svg:height="0.71cm" svg:x="65.8cm" svg:y="55.795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3cm" svg:height="0.71cm" svg:x="66.8cm" svg:y="55.795cm">
          <draw:text-box>
            <text:p text:style-name="P2"><text:span text:style-name="T1">№ докум.</text:span></text:p>
          </draw:text-box>
        </draw:frame>
        <draw:frame draw:style-name="gr2" draw:text-style-name="P1" draw:layer="layout" svg:width="1.5cm" svg:height="0.71cm" svg:x="69.1cm" svg:y="55.795cm">
          <draw:text-box>
            <text:p text:style-name="P2"><text:span text:style-name="T1">Подп.</text:span></text:p>
          </draw:text-box>
        </draw:frame>
        <draw:frame draw:style-name="gr4" draw:text-style-name="P1" draw:layer="layout" svg:width="1cm" svg:height="0.71cm" svg:x="70.6cm" svg:y="55.795cm">
          <draw:text-box>
            <text:p text:style-name="P2"><text:span text:style-name="T1">Дата</text:span></text:p>
          </draw:text-box>
        </draw:frame>
        <draw:frame draw:style-name="gr2" draw:text-style-name="P1" draw:layer="layout" svg:width="1.7cm" svg:height="0.71cm" svg:x="65.1cm" svg:y="56.295cm">
          <draw:text-box>
            <text:p text:style-name="P3"><text:span text:style-name="T1">Разраб.</text:span></text:p>
          </draw:text-box>
        </draw:frame>
        <draw:frame draw:style-name="gr2" draw:text-style-name="P1" draw:layer="layout" svg:width="1.7cm" svg:height="0.71cm" svg:x="65.1cm" svg:y="56.795cm">
          <draw:text-box>
            <text:p text:style-name="P3"><text:span text:style-name="T1">Пров.</text:span></text:p>
          </draw:text-box>
        </draw:frame>
        <draw:frame draw:style-name="gr5" draw:text-style-name="P1" draw:layer="layout" svg:width="1.7cm" svg:height="0.71cm" svg:x="65.1cm" svg:y="57.795cm">
          <draw:text-box>
            <text:p text:style-name="P3"><text:span text:style-name="T1">Н.Контр.</text:span></text:p>
          </draw:text-box>
        </draw:frame>
        <draw:frame draw:style-name="gr2" draw:text-style-name="P1" draw:layer="layout" svg:width="1.7cm" svg:height="0.71cm" svg:x="65.1cm" svg:y="58.295cm">
          <draw:text-box>
            <text:p text:style-name="P3"><text:span text:style-name="T1">Утв.</text:span></text:p>
          </draw:text-box>
        </draw:frame>
        <draw:frame draw:style-name="gr2" draw:text-style-name="P1" draw:layer="layout" svg:width="2.7cm" svg:height="0.71cm" svg:x="66.8cm" svg:y="58.295cm">
          <draw:text-box>
            <text:p text:style-name="P3"><text:span text:style-name="T1">Головко В.А.</text:span></text:p>
          </draw:text-box>
        </draw:frame>
        <draw:frame draw:style-name="gr2" draw:text-style-name="P1" draw:layer="layout" svg:width="1.85cm" svg:height="0.71cm" svg:x="80.1cm" svg:y="56.795cm">
          <draw:text-box>
            <text:p text:style-name="P2"><text:span text:style-name="T1">1</text:span></text:p>
          </draw:text-box>
        </draw:frame>
        <draw:frame draw:style-name="gr2" draw:text-style-name="P1" draw:layer="layout" svg:width="1.66cm" svg:height="0.71cm" svg:x="81.94cm" svg:y="56.795cm">
          <draw:text-box>
            <text:p text:style-name="P2"><text:span text:style-name="T1">1</text:span></text:p>
          </draw:text-box>
        </draw:frame>
        <draw:frame draw:style-name="gr4" draw:text-style-name="P1" draw:layer="layout" svg:width="0.5cm" svg:height="0.71cm" svg:x="78.6cm" svg:y="56.795cm">
          <draw:text-box>
            <text:p text:style-name="P2"><text:span text:style-name="T1">Д</text:span></text:p>
          </draw:text-box>
        </draw:frame>
        <draw:line draw:style-name="gr1" draw:text-style-name="P1" draw:layer="layout" svg:x1="78.6cm" svg:y1="58.899cm" svg:x2="78.6cm" svg:y2="56.4cm">
          <text:p/>
        </draw:line>
        <draw:line draw:style-name="gr1" draw:text-style-name="P1" draw:layer="layout" svg:x1="71.6cm" svg:y1="58.899cm" svg:x2="71.6cm" svg:y2="54.9cm">
          <text:p/>
        </draw:line>
        <draw:line draw:style-name="gr6" draw:text-style-name="P1" draw:layer="layout" svg:x1="65.1cm" svg:y1="58.4cm" svg:x2="71.6cm" svg:y2="58.4cm">
          <text:p/>
        </draw:line>
        <draw:line draw:style-name="gr6" draw:text-style-name="P1" draw:layer="layout" svg:x1="71.6cm" svg:y1="57.9cm" svg:x2="65.1cm" svg:y2="57.9cm">
          <text:p/>
        </draw:line>
        <draw:line draw:style-name="gr1" draw:text-style-name="P1" draw:layer="layout" svg:x1="83.599cm" svg:y1="57.4cm" svg:x2="78.6cm" svg:y2="57.4cm">
          <text:p/>
        </draw:line>
        <draw:line draw:style-name="gr6" draw:text-style-name="P1" draw:layer="layout" svg:x1="71.6cm" svg:y1="57.4cm" svg:x2="65.1cm" svg:y2="57.4cm">
          <text:p/>
        </draw:line>
        <draw:line draw:style-name="gr1" draw:text-style-name="P1" draw:layer="layout" svg:x1="83.599cm" svg:y1="56.4cm" svg:x2="65.1cm" svg:y2="56.4cm">
          <text:p/>
        </draw:line>
        <draw:line draw:style-name="gr1" draw:text-style-name="P1" draw:layer="layout" svg:x1="65.1cm" svg:y1="55.9cm" svg:x2="71.6cm" svg:y2="55.9cm">
          <text:p/>
        </draw:line>
        <draw:line draw:style-name="gr1" draw:text-style-name="P1" draw:layer="layout" svg:x1="65.1cm" svg:y1="54.9cm" svg:x2="83.599cm" svg:y2="54.9cm">
          <text:p/>
        </draw:line>
        <draw:line draw:style-name="gr6" draw:text-style-name="P1" draw:layer="layout" svg:x1="65.1cm" svg:y1="56.9cm" svg:x2="71.6cm" svg:y2="56.9cm">
          <text:p/>
        </draw:line>
        <draw:line draw:style-name="gr1" draw:text-style-name="P1" draw:layer="layout" svg:x1="70.6cm" svg:y1="54.9cm" svg:x2="70.6cm" svg:y2="58.899cm">
          <text:p/>
        </draw:line>
        <draw:line draw:style-name="gr1" draw:text-style-name="P1" draw:layer="layout" svg:x1="69.1cm" svg:y1="54.9cm" svg:x2="69.1cm" svg:y2="58.899cm">
          <text:p/>
        </draw:line>
        <draw:line draw:style-name="gr1" draw:text-style-name="P1" draw:layer="layout" svg:x1="65.8cm" svg:y1="54.9cm" svg:x2="65.8cm" svg:y2="56.399cm">
          <text:p/>
        </draw:line>
        <draw:line draw:style-name="gr1" draw:text-style-name="P1" draw:layer="layout" svg:x1="66.8cm" svg:y1="54.9cm" svg:x2="66.8cm" svg:y2="58.899cm">
          <text:p/>
        </draw:line>
        <draw:line draw:style-name="gr1" draw:text-style-name="P1" draw:layer="layout" svg:x1="78.6cm" svg:y1="56.9cm" svg:x2="83.599cm" svg:y2="56.9cm">
          <text:p/>
        </draw:line>
        <draw:polyline draw:style-name="gr1" draw:text-style-name="P1" draw:layer="layout" svg:width="0cm" svg:height="0.998cm" svg:x="81.95cm" svg:y="56.4cm" svg:viewBox="0 0 0 999" draw:points="0,0 0,428 0,999">
          <text:p/>
        </draw:polyline>
        <draw:line draw:style-name="gr1" draw:text-style-name="P1" draw:layer="layout" svg:x1="80.1cm" svg:y1="56.4cm" svg:x2="80.1cm" svg:y2="57.399cm">
          <text:p/>
        </draw:line>
        <draw:line draw:style-name="gr6" draw:text-style-name="P1" draw:layer="layout" svg:x1="71.6cm" svg:y1="55.4cm" svg:x2="65.1cm" svg:y2="55.4cm">
          <text:p/>
        </draw:line>
        <draw:line draw:style-name="gr6" draw:text-style-name="P1" draw:layer="layout" svg:x1="79.1cm" svg:y1="56.9cm" svg:x2="79.1cm" svg:y2="57.4cm">
          <text:p/>
        </draw:line>
        <draw:line draw:style-name="gr6" draw:text-style-name="P1" draw:layer="layout" svg:x1="79.6cm" svg:y1="56.9cm" svg:x2="79.6cm" svg:y2="57.4cm">
          <text:p/>
        </draw:line>
        <draw:line draw:style-name="gr1" draw:text-style-name="P1" draw:layer="layout" svg:x1="65.1cm" svg:y1="54.9cm" svg:x2="65.1cm" svg:y2="58.899cm">
          <text:p/>
        </draw:line>
        <draw:frame draw:style-name="gr3" draw:text-style-name="P1" draw:layer="layout" svg:width="12cm" svg:height="1.5cm" svg:x="71.5cm" svg:y="54.9cm">
          <draw:text-box>
            <text:p text:style-name="P2"><text:span text:style-name="T2">ДП.АС59.200043-05 93 00</text:span></text:p>
          </draw:text-box>
        </draw:frame>
        <draw:frame draw:style-name="gr7" draw:text-style-name="P1" draw:layer="layout" svg:width="7cm" svg:height="2.5cm" svg:x="71.6cm" svg:y="56.4cm">
          <draw:text-box>
            <text:p text:style-name="P2"><text:span text:style-name="T3">Разработка модуля прогнозирования данных временных рядов технологического процесса пастеризационной установки</text:span></text:p>
          </draw:text-box>
        </draw:frame>
        <draw:frame draw:style-name="gr2" draw:text-style-name="P1" draw:layer="layout" svg:width="2.7cm" svg:height="0.71cm" svg:x="66.8cm" svg:y="57.795cm">
          <draw:text-box>
            <text:p text:style-name="P3"><text:span text:style-name="T1">Булей Е.В.</text:span></text:p>
          </draw:text-box>
        </draw:frame>
        <draw:frame draw:style-name="gr2" draw:text-style-name="P1" draw:layer="layout" svg:width="2.75cm" svg:height="0.71cm" svg:x="66.8cm" svg:y="56.795cm">
          <draw:text-box>
            <text:p text:style-name="P3"><text:span text:style-name="T1">Иванюк Д.С.</text:span></text:p>
          </draw:text-box>
        </draw:frame>
        <draw:g draw:style-name="gr8">
          <draw:g draw:style-name="gr9">
            <draw:polygon draw:style-name="gr10" draw:text-style-name="P4" draw:layer="layout" svg:width="7cm" svg:height="1.4cm" svg:x="2cm" svg:y="0.5cm" svg:viewBox="0 0 7001 1401" draw:points="7001,0 0,0 0,1401 7001,1400">
              <text:p/>
            </draw:polygon>
            <draw:polygon draw:style-name="gr11" draw:text-style-name="P1" draw:layer="layout" svg:width="7cm" svg:height="1.4cm" svg:x="2cm" svg:y="0.5cm" svg:viewBox="0 0 7001 1401" draw:points="7001,0 0,0 0,1401 7001,1400">
              <text:p/>
            </draw:polygon>
          </draw:g>
          <draw:frame draw:style-name="gr12" draw:text-style-name="P1" draw:layer="layout" svg:width="7cm" svg:height="1.4cm" draw:transform="rotate (-3.14159265358979) translate (9cm 1.9cm)">
            <draw:text-box>
              <text:p text:style-name="P2"><text:span text:style-name="T4">ДП.АС59.200043-05 93 00</text:span></text:p>
            </draw:text-box>
          </draw:frame>
        </draw:g>
        <draw:frame draw:style-name="gr2" draw:text-style-name="P1" draw:layer="layout" svg:width="2.75cm" svg:height="0.71cm" svg:x="66.8cm" svg:y="56.295cm">
          <draw:text-box>
            <text:p text:style-name="P3"><text:span text:style-name="T1">Абоимов И.В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30T12:49:28.686421183</dc:date>
    <meta:creation-date>2024-06-01T14:06:03Z</meta:creation-date>
    <meta:generator>LibreOffice/25.8.4.2$Linux_X86_64 LibreOffice_project/580$Build-2</meta:generator>
    <meta:editing-duration>PT9M22S</meta:editing-duration>
    <meta:editing-cycles>1</meta:editing-cycles>
    <meta:document-statistic meta:object-count="107"/>
  </office:meta>
</office:document-meta>
</file>