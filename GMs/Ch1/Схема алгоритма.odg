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graphics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svg:stroke-opacity="100%" draw:stroke-linejoin="miter" svg:stroke-linecap="butt" draw:fill="none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none" draw:fill="none" draw:textarea-vertical-align="middle" fo:min-height="0.218cm" fo:min-width="2.54cm" fo:padding-top="0.141cm" fo:padding-bottom="0.141cm" fo:padding-left="0.141cm" fo:padding-right="0.141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218cm" fo:min-width="2.54cm" fo:padding-top="0.141cm" fo:padding-bottom="0.141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218cm" fo:min-width="2.54cm" fo:padding-top="0.141cm" fo:padding-bottom="0.141cm" fo:padding-left="0.141cm" fo:padding-right="0cm" loext:decorative="false"/>
      <style:paragraph-properties style:writing-mode="lr-tb"/>
    </style:style>
    <style:style style:name="gr6" style:family="graphic" style:parent-style-name="standard">
      <style:graphic-properties draw:stroke="solid" svg:stroke-width="0.025cm" svg:stroke-color="#000000" svg:stroke-opacity="100%" draw:stroke-linejoin="miter" svg:stroke-linecap="butt" draw:fill="none" fo:padding-top="0.137cm" fo:padding-bottom="0.137cm" fo:padding-left="0.262cm" fo:padding-right="0.262cm" loext:decorative="false"/>
    </style:style>
    <style:style style:name="gr7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>
      <style:graphic-properties style:writing-mode="lr-tb" loext:decorative="false"/>
    </style:style>
    <style:style style:name="gr9" style:family="graphic">
      <style:graphic-properties loext:decorative="false"/>
    </style:style>
    <style:style style:name="gr10" style:family="graphic" style:parent-style-name="standard">
      <style:graphic-properties draw:stroke="none" draw:fill="solid" draw:fill-color="#ffffff" draw:shadow="hidden" loext:decorative="false"/>
    </style:style>
    <style:style style:name="gr11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loext:decorative="false"/>
    </style:style>
    <style:style style:name="gr12" style:family="graphic" style:parent-style-name="standard">
      <style:graphic-properties draw:stroke="none" draw:fill="none" draw:textarea-vertical-align="middle" fo:min-height="1.258cm" fo:min-width="2.54cm" fo:padding-top="0.071cm" fo:padding-bottom="0.071cm" fo:padding-left="0.071cm" fo:padding-right="0.071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solid" draw:fill-color="#ffffff"/>
    </style:style>
    <style:style style:name="P5" style:family="paragraph">
      <style:paragraph-properties fo:text-align="center"/>
    </style:style>
    <style:style style:name="T1" style:family="text">
      <style:text-properties fo:color="#000000" loext:opacity="100%"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2" style:family="text">
      <style:text-properties fo:color="#000000" loext:opacity="100%" style:font-name="Arial" fo:font-size="18pt" fo:font-style="italic" style:font-name-asian="Arial" style:font-size-asian="18pt" style:font-style-asian="italic" style:font-name-complex="Arial" style:font-size-complex="18pt" style:font-style-complex="italic"/>
    </style:style>
    <style:style style:name="T3" style:family="text">
      <style:text-properties fo:color="#000000" loext:opacity="100%"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T4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Схема а" draw:style-name="dp1" draw:master-page-name="PM0">
        <draw:line draw:style-name="gr1" draw:text-style-name="P1" draw:layer="layout" svg:x1="2cm" svg:y1="1.2cm" svg:x2="2cm" svg:y2="58.9cm">
          <text:p/>
        </draw:line>
        <draw:line draw:style-name="gr1" draw:text-style-name="P1" draw:layer="layout" svg:x1="2cm" svg:y1="0.5cm" svg:x2="83.6cm" svg:y2="0.5cm">
          <text:p/>
        </draw:line>
        <draw:line draw:style-name="gr1" draw:text-style-name="P1" draw:layer="layout" svg:x1="83.6cm" svg:y1="58.899cm" svg:x2="83.6cm" svg:y2="0.5cm">
          <text:p/>
        </draw:line>
        <draw:line draw:style-name="gr1" draw:text-style-name="P1" draw:layer="layout" svg:x1="2cm" svg:y1="58.9cm" svg:x2="83.6cm" svg:y2="58.9cm">
          <text:p/>
        </draw:line>
        <draw:frame draw:style-name="gr2" draw:text-style-name="P1" draw:layer="layout" svg:width="1.85cm" svg:height="0.71cm" svg:x="80.1cm" svg:y="56.295cm">
          <draw:text-box>
            <text:p text:style-name="P2"><text:span text:style-name="T1">Лист </text:span></text:p>
          </draw:text-box>
        </draw:frame>
        <draw:frame draw:style-name="gr2" draw:text-style-name="P1" draw:layer="layout" svg:width="1.66cm" svg:height="0.71cm" svg:x="81.94cm" svg:y="56.295cm">
          <draw:text-box>
            <text:p text:style-name="P2"><text:span text:style-name="T1">Листов </text:span></text:p>
          </draw:text-box>
        </draw:frame>
        <draw:frame draw:style-name="gr3" draw:text-style-name="P1" draw:layer="layout" svg:width="5cm" svg:height="1.5cm" svg:x="78.6cm" svg:y="57.4cm">
          <draw:text-box>
            <text:p text:style-name="P2"><text:span text:style-name="T2">БрГТУ</text:span></text:p>
          </draw:text-box>
        </draw:frame>
        <draw:frame draw:style-name="gr2" draw:text-style-name="P1" draw:layer="layout" svg:width="1.5cm" svg:height="0.71cm" svg:x="78.6cm" svg:y="56.295cm">
          <draw:text-box>
            <text:p text:style-name="P2"><text:span text:style-name="T1">Лит</text:span></text:p>
          </draw:text-box>
        </draw:frame>
        <draw:frame draw:style-name="gr4" draw:text-style-name="P1" draw:layer="layout" svg:width="0.7cm" svg:height="0.71cm" svg:x="65.1cm" svg:y="55.795cm">
          <draw:text-box>
            <text:p text:style-name="P2"><text:span text:style-name="T1">Изм</text:span></text:p>
          </draw:text-box>
        </draw:frame>
        <draw:frame draw:style-name="gr4" draw:text-style-name="P1" draw:layer="layout" svg:width="1cm" svg:height="0.71cm" svg:x="65.8cm" svg:y="55.795cm">
          <draw:text-box>
            <text:p text:style-name="P2"><text:span text:style-name="T1">Лист</text:span></text:p>
          </draw:text-box>
        </draw:frame>
        <draw:frame draw:style-name="gr2" draw:text-style-name="P1" draw:layer="layout" svg:width="2.3cm" svg:height="0.71cm" svg:x="66.8cm" svg:y="55.795cm">
          <draw:text-box>
            <text:p text:style-name="P2"><text:span text:style-name="T1">№ докум.</text:span></text:p>
          </draw:text-box>
        </draw:frame>
        <draw:frame draw:style-name="gr2" draw:text-style-name="P1" draw:layer="layout" svg:width="1.5cm" svg:height="0.71cm" svg:x="69.1cm" svg:y="55.795cm">
          <draw:text-box>
            <text:p text:style-name="P2"><text:span text:style-name="T1">Подп.</text:span></text:p>
          </draw:text-box>
        </draw:frame>
        <draw:frame draw:style-name="gr4" draw:text-style-name="P1" draw:layer="layout" svg:width="1cm" svg:height="0.71cm" svg:x="70.6cm" svg:y="55.795cm">
          <draw:text-box>
            <text:p text:style-name="P2"><text:span text:style-name="T1">Дата</text:span></text:p>
          </draw:text-box>
        </draw:frame>
        <draw:frame draw:style-name="gr2" draw:text-style-name="P1" draw:layer="layout" svg:width="1.7cm" svg:height="0.71cm" svg:x="65.1cm" svg:y="56.295cm">
          <draw:text-box>
            <text:p text:style-name="P3"><text:span text:style-name="T1">Разраб.</text:span></text:p>
          </draw:text-box>
        </draw:frame>
        <draw:frame draw:style-name="gr2" draw:text-style-name="P1" draw:layer="layout" svg:width="1.7cm" svg:height="0.71cm" svg:x="65.1cm" svg:y="56.795cm">
          <draw:text-box>
            <text:p text:style-name="P3"><text:span text:style-name="T1">Пров.</text:span></text:p>
          </draw:text-box>
        </draw:frame>
        <draw:frame draw:style-name="gr5" draw:text-style-name="P1" draw:layer="layout" svg:width="1.7cm" svg:height="0.71cm" svg:x="65.1cm" svg:y="57.795cm">
          <draw:text-box>
            <text:p text:style-name="P3"><text:span text:style-name="T1">Н.Контр.</text:span></text:p>
          </draw:text-box>
        </draw:frame>
        <draw:frame draw:style-name="gr2" draw:text-style-name="P1" draw:layer="layout" svg:width="1.7cm" svg:height="0.71cm" svg:x="65.1cm" svg:y="58.295cm">
          <draw:text-box>
            <text:p text:style-name="P3"><text:span text:style-name="T1">Утв.</text:span></text:p>
          </draw:text-box>
        </draw:frame>
        <draw:frame draw:style-name="gr2" draw:text-style-name="P1" draw:layer="layout" svg:width="2.7cm" svg:height="0.71cm" svg:x="66.8cm" svg:y="58.295cm">
          <draw:text-box>
            <text:p text:style-name="P3"><text:span text:style-name="T1">Головко В.А.</text:span></text:p>
          </draw:text-box>
        </draw:frame>
        <draw:frame draw:style-name="gr2" draw:text-style-name="P1" draw:layer="layout" svg:width="1.85cm" svg:height="0.71cm" svg:x="80.1cm" svg:y="56.795cm">
          <draw:text-box>
            <text:p text:style-name="P2"><text:span text:style-name="T1">1</text:span></text:p>
          </draw:text-box>
        </draw:frame>
        <draw:frame draw:style-name="gr2" draw:text-style-name="P1" draw:layer="layout" svg:width="1.66cm" svg:height="0.71cm" svg:x="81.94cm" svg:y="56.795cm">
          <draw:text-box>
            <text:p text:style-name="P2"><text:span text:style-name="T1">1</text:span></text:p>
          </draw:text-box>
        </draw:frame>
        <draw:frame draw:style-name="gr4" draw:text-style-name="P1" draw:layer="layout" svg:width="0.5cm" svg:height="0.71cm" svg:x="78.6cm" svg:y="56.795cm">
          <draw:text-box>
            <text:p text:style-name="P2"><text:span text:style-name="T1">Д</text:span></text:p>
          </draw:text-box>
        </draw:frame>
        <draw:line draw:style-name="gr1" draw:text-style-name="P1" draw:layer="layout" svg:x1="78.6cm" svg:y1="58.899cm" svg:x2="78.6cm" svg:y2="56.4cm">
          <text:p/>
        </draw:line>
        <draw:line draw:style-name="gr1" draw:text-style-name="P1" draw:layer="layout" svg:x1="71.6cm" svg:y1="58.899cm" svg:x2="71.6cm" svg:y2="54.9cm">
          <text:p/>
        </draw:line>
        <draw:line draw:style-name="gr6" draw:text-style-name="P1" draw:layer="layout" svg:x1="65.1cm" svg:y1="58.4cm" svg:x2="71.6cm" svg:y2="58.4cm">
          <text:p/>
        </draw:line>
        <draw:line draw:style-name="gr6" draw:text-style-name="P1" draw:layer="layout" svg:x1="71.6cm" svg:y1="57.9cm" svg:x2="65.1cm" svg:y2="57.9cm">
          <text:p/>
        </draw:line>
        <draw:line draw:style-name="gr1" draw:text-style-name="P1" draw:layer="layout" svg:x1="83.599cm" svg:y1="57.4cm" svg:x2="78.6cm" svg:y2="57.4cm">
          <text:p/>
        </draw:line>
        <draw:line draw:style-name="gr6" draw:text-style-name="P1" draw:layer="layout" svg:x1="71.6cm" svg:y1="57.4cm" svg:x2="65.1cm" svg:y2="57.4cm">
          <text:p/>
        </draw:line>
        <draw:line draw:style-name="gr1" draw:text-style-name="P1" draw:layer="layout" svg:x1="83.599cm" svg:y1="56.4cm" svg:x2="65.1cm" svg:y2="56.4cm">
          <text:p/>
        </draw:line>
        <draw:line draw:style-name="gr1" draw:text-style-name="P1" draw:layer="layout" svg:x1="65.1cm" svg:y1="55.9cm" svg:x2="71.6cm" svg:y2="55.9cm">
          <text:p/>
        </draw:line>
        <draw:line draw:style-name="gr1" draw:text-style-name="P1" draw:layer="layout" svg:x1="65.1cm" svg:y1="54.9cm" svg:x2="83.599cm" svg:y2="54.9cm">
          <text:p/>
        </draw:line>
        <draw:line draw:style-name="gr6" draw:text-style-name="P1" draw:layer="layout" svg:x1="65.1cm" svg:y1="56.9cm" svg:x2="71.6cm" svg:y2="56.9cm">
          <text:p/>
        </draw:line>
        <draw:line draw:style-name="gr1" draw:text-style-name="P1" draw:layer="layout" svg:x1="70.6cm" svg:y1="54.9cm" svg:x2="70.6cm" svg:y2="58.899cm">
          <text:p/>
        </draw:line>
        <draw:line draw:style-name="gr1" draw:text-style-name="P1" draw:layer="layout" svg:x1="69.1cm" svg:y1="54.9cm" svg:x2="69.1cm" svg:y2="58.899cm">
          <text:p/>
        </draw:line>
        <draw:line draw:style-name="gr1" draw:text-style-name="P1" draw:layer="layout" svg:x1="65.8cm" svg:y1="54.9cm" svg:x2="65.8cm" svg:y2="56.399cm">
          <text:p/>
        </draw:line>
        <draw:line draw:style-name="gr1" draw:text-style-name="P1" draw:layer="layout" svg:x1="66.8cm" svg:y1="54.9cm" svg:x2="66.8cm" svg:y2="58.899cm">
          <text:p/>
        </draw:line>
        <draw:line draw:style-name="gr1" draw:text-style-name="P1" draw:layer="layout" svg:x1="78.6cm" svg:y1="56.9cm" svg:x2="83.599cm" svg:y2="56.9cm">
          <text:p/>
        </draw:line>
        <draw:polyline draw:style-name="gr1" draw:text-style-name="P1" draw:layer="layout" svg:width="0cm" svg:height="0.998cm" svg:x="81.95cm" svg:y="56.4cm" svg:viewBox="0 0 0 999" draw:points="0,0 0,428 0,999">
          <text:p/>
        </draw:polyline>
        <draw:line draw:style-name="gr1" draw:text-style-name="P1" draw:layer="layout" svg:x1="80.1cm" svg:y1="56.4cm" svg:x2="80.1cm" svg:y2="57.399cm">
          <text:p/>
        </draw:line>
        <draw:line draw:style-name="gr6" draw:text-style-name="P1" draw:layer="layout" svg:x1="71.6cm" svg:y1="55.4cm" svg:x2="65.1cm" svg:y2="55.4cm">
          <text:p/>
        </draw:line>
        <draw:line draw:style-name="gr6" draw:text-style-name="P1" draw:layer="layout" svg:x1="79.1cm" svg:y1="56.9cm" svg:x2="79.1cm" svg:y2="57.4cm">
          <text:p/>
        </draw:line>
        <draw:line draw:style-name="gr6" draw:text-style-name="P1" draw:layer="layout" svg:x1="79.6cm" svg:y1="56.9cm" svg:x2="79.6cm" svg:y2="57.4cm">
          <text:p/>
        </draw:line>
        <draw:line draw:style-name="gr1" draw:text-style-name="P1" draw:layer="layout" svg:x1="65.1cm" svg:y1="54.9cm" svg:x2="65.1cm" svg:y2="58.899cm">
          <text:p/>
        </draw:line>
        <draw:frame draw:style-name="gr3" draw:text-style-name="P1" draw:layer="layout" svg:width="12cm" svg:height="1.5cm" svg:x="71.5cm" svg:y="54.9cm">
          <draw:text-box>
            <text:p text:style-name="P2"><text:span text:style-name="T2">ДП.АС64.220047-05 81 00</text:span></text:p>
          </draw:text-box>
        </draw:frame>
        <draw:frame draw:style-name="gr7" draw:text-style-name="P1" draw:layer="layout" svg:width="7cm" svg:height="2.5cm" svg:x="71.6cm" svg:y="56.4cm">
          <draw:text-box>
            <text:p text:style-name="P2"><text:span text:style-name="T3">Разработка серверной части приложения “Такси”</text:span></text:p>
          </draw:text-box>
        </draw:frame>
        <draw:frame draw:style-name="gr2" draw:text-style-name="P1" draw:layer="layout" svg:width="2.7cm" svg:height="0.71cm" svg:x="66.8cm" svg:y="57.795cm">
          <draw:text-box>
            <text:p text:style-name="P3"><text:span text:style-name="T1">Гирель Т. Н.</text:span></text:p>
          </draw:text-box>
        </draw:frame>
        <draw:frame draw:style-name="gr2" draw:text-style-name="P1" draw:layer="layout" svg:width="2.75cm" svg:height="0.71cm" svg:x="66.8cm" svg:y="56.795cm">
          <draw:text-box>
            <text:p text:style-name="P3"><text:span text:style-name="T1">Гирель Т. Н.</text:span></text:p>
          </draw:text-box>
        </draw:frame>
        <draw:g draw:style-name="gr8">
          <draw:g draw:style-name="gr9">
            <draw:polygon draw:style-name="gr10" draw:text-style-name="P4" draw:layer="layout" svg:width="7cm" svg:height="1.4cm" svg:x="2cm" svg:y="0.5cm" svg:viewBox="0 0 7001 1401" draw:points="7001,0 0,0 0,1401 7001,1400">
              <text:p/>
            </draw:polygon>
            <draw:polygon draw:style-name="gr11" draw:text-style-name="P1" draw:layer="layout" svg:width="7cm" svg:height="1.4cm" svg:x="2cm" svg:y="0.5cm" svg:viewBox="0 0 7001 1401" draw:points="7001,0 0,0 0,1401 7001,1400">
              <text:p/>
            </draw:polygon>
          </draw:g>
          <draw:frame draw:style-name="gr12" draw:text-style-name="P1" draw:layer="layout" svg:width="7cm" svg:height="1.4cm" draw:transform="rotate (-3.14159265358979) translate (9cm 1.9cm)">
            <draw:text-box>
              <text:p text:style-name="P2"><text:span text:style-name="T4">ДП.АС64.220047-05 81 00</text:span></text:p>
            </draw:text-box>
          </draw:frame>
        </draw:g>
        <draw:frame draw:style-name="gr2" draw:text-style-name="P1" draw:layer="layout" svg:width="2.75cm" svg:height="0.71cm" svg:x="66.8cm" svg:y="56.295cm">
          <draw:text-box>
            <text:p text:style-name="P3"><text:span text:style-name="T1">Кужир В.В.</text:span></text:p>
          </draw:text-box>
        </draw:frame>
        <draw:frame draw:style-name="gr13" draw:text-style-name="P5" draw:layer="layout" svg:width="41.593cm" svg:height="53.826cm" svg:x="19.049cm" svg:y="2.2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5-20T22:01:57.389613606</dc:date>
    <meta:creation-date>2024-06-01T14:06:03Z</meta:creation-date>
    <meta:generator>LibreOffice/25.8.4.2$Linux_X86_64 LibreOffice_project/580$Build-2</meta:generator>
    <meta:editing-duration>PT3M58S</meta:editing-duration>
    <meta:editing-cycles>1</meta:editing-cycles>
    <meta:document-statistic meta:object-count="53"/>
  </office:meta>
</office:document-meta>
</file>

<file path=Object 2/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marker-end="Marker_5f_0" draw:marker-end-width="0.321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2" style:family="graphic">
      <style:graphic-properties style:writing-mode="lr-tb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draw:fill="solid" draw:fill-color="#ffffff" draw:shadow="hidden" loext:decorative="false"/>
    </style:style>
    <style:style style:name="gr5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6" style:family="graphic" style:parent-style-name="standard">
      <style:graphic-properties draw:stroke="none" draw:fill="none" draw:textarea-vertical-align="middle" fo:min-height="2.54cm" fo:min-width="2.5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.258cm" fo:min-width="2.54cm" fo:padding-top="0.141cm" fo:padding-bottom="0.141cm" fo:padding-left="0.141cm" fo:padding-right="0.141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loext:opacity="100%" style:font-name="Helvetica" fo:font-size="8.19999980926514pt" style:font-name-asian="Helvetica" style:font-size-asian="8.19999980926514pt" style:font-name-complex="Helvetica" style:font-size-complex="8.19999980926514pt"/>
    </style:style>
    <style:style style:name="T2" style:family="text">
      <style:text-properties fo:color="#000000" loext:opacity="100%" style:font-name="Helvetica" fo:font-size="7.5pt" fo:background-color="#ffffff" style:font-name-asian="Helvetica" style:font-size-asian="7.5pt" style:font-name-complex="Helvetica" style:font-size-complex="7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line draw:style-name="gr1" draw:text-style-name="P1" draw:layer="layout" svg:width="0cm" svg:height="0.899cm" svg:x="1.75cm" svg:y="1cm" svg:viewBox="0 0 0 900" draw:points="0,0 0,500 0,399 0,900">
          <text:p/>
        </draw:polyline>
        <draw:g draw:style-name="gr2">
          <draw:g draw:style-name="gr3">
            <draw:polygon draw:style-name="gr4" draw:text-style-name="P2" draw:layer="layout" svg:width="1.875cm" svg:height="0.75cm" svg:x="0.813cm" svg:y="0.25cm" svg:viewBox="0 0 1876 751" draw:points="0,0 1876,0 1876,751 0,751">
              <text:p/>
            </draw:polygon>
            <draw:polygon draw:style-name="gr5" draw:text-style-name="P1" draw:layer="layout" svg:width="1.875cm" svg:height="0.75cm" svg:x="0.813cm" svg:y="0.25cm" svg:viewBox="0 0 1876 751" draw:points="0,0 1876,0 1876,751 0,751">
              <text:p/>
            </draw:polygon>
          </draw:g>
          <draw:frame draw:style-name="gr6" draw:text-style-name="P1" draw:layer="layout" svg:width="2.54cm" svg:height="2.54cm" svg:x="0.48cm" svg:y="-0.645cm">
            <draw:text-box>
              <text:p text:style-name="P3"><text:span text:style-name="T1">Начало</text:span></text:p>
            </draw:text-box>
          </draw:frame>
        </draw:g>
        <draw:line draw:style-name="gr1" draw:text-style-name="P1" draw:layer="layout" svg:x1="1.75cm" svg:y1="3.4cm" svg:x2="1.75cm" svg:y2="4.449cm">
          <text:p/>
        </draw:line>
        <draw:g draw:style-name="gr2">
          <draw:g draw:style-name="gr3">
            <draw:polygon draw:style-name="gr4" draw:text-style-name="P2" draw:layer="layout" svg:width="3cm" svg:height="1.5cm" svg:x="0.25cm" svg:y="1.9cm" svg:viewBox="0 0 3001 1501" draw:points="0,1501 499,0 3001,0 2501,1501">
              <text:p/>
            </draw:polygon>
            <draw:polygon draw:style-name="gr5" draw:text-style-name="P1" draw:layer="layout" svg:width="3cm" svg:height="1.5cm" svg:x="0.25cm" svg:y="1.9cm" svg:viewBox="0 0 3001 1501" draw:points="0,1501 499,0 3001,0 2501,1501">
              <text:p/>
            </draw:polygon>
          </draw:g>
          <draw:frame draw:style-name="gr6" draw:text-style-name="P1" draw:layer="layout" svg:width="2.54cm" svg:height="2.54cm" svg:x="0.48cm" svg:y="1.38cm">
            <draw:text-box>
              <text:p text:style-name="P3"><text:span text:style-name="T1">Ввод данных поездки</text:span></text:p>
            </draw:text-box>
          </draw:frame>
        </draw:g>
        <draw:g draw:style-name="gr3">
          <draw:line draw:style-name="gr1" draw:text-style-name="P1" draw:layer="layout" svg:x1="1.75cm" svg:y1="7.2cm" svg:x2="1.75cm" svg:y2="8.474cm">
            <text:p/>
          </draw:line>
          <draw:frame draw:style-name="gr7" draw:text-style-name="P1" draw:layer="layout" svg:width="2.54cm" svg:height="2.54cm" svg:x="0.48cm" svg:y="6.58cm">
            <draw:text-box>
              <text:p text:style-name="P3"><text:span text:style-name="T2">да</text:span></text:p>
            </draw:text-box>
          </draw:frame>
        </draw:g>
        <draw:g draw:style-name="gr3">
          <draw:polyline draw:style-name="gr1" draw:text-style-name="P1" draw:layer="layout" svg:width="1.95cm" svg:height="3.175cm" svg:x="3cm" svg:y="2.65cm" svg:viewBox="0 0 1951 3176" draw:points="149,3176 1951,3176 1951,0 0,0">
            <text:p/>
          </draw:polyline>
          <draw:frame draw:style-name="gr7" draw:text-style-name="P1" draw:layer="layout" svg:width="2.54cm" svg:height="2.54cm" svg:x="3.68cm" svg:y="2.88cm">
            <draw:text-box>
              <text:p text:style-name="P3"><text:span text:style-name="T2">нет</text:span></text:p>
            </draw:text-box>
          </draw:frame>
        </draw:g>
        <draw:g draw:style-name="gr2">
          <draw:g draw:style-name="gr3">
            <draw:polygon draw:style-name="gr4" draw:text-style-name="P2" draw:layer="layout" svg:width="2.8cm" svg:height="2.75cm" svg:x="0.35cm" svg:y="4.45cm" svg:viewBox="0 0 2801 2751" draw:points="1401,0 2801,1375 1401,2751 0,1375">
              <text:p/>
            </draw:polygon>
            <draw:polygon draw:style-name="gr5" draw:text-style-name="P1" draw:layer="layout" svg:width="2.8cm" svg:height="2.75cm" svg:x="0.35cm" svg:y="4.45cm" svg:viewBox="0 0 2801 2751" draw:points="1401,0 2801,1375 1401,2751 0,1375">
              <text:p/>
            </draw:polygon>
          </draw:g>
          <draw:frame draw:style-name="gr6" draw:text-style-name="P1" draw:layer="layout" svg:width="2.54cm" svg:height="2.54cm" svg:x="0.48cm" svg:y="4.555cm">
            <draw:text-box>
              <text:p text:style-name="P3"><text:span text:style-name="T1">Данные корректны?</text:span></text:p>
            </draw:text-box>
          </draw:frame>
        </draw:g>
        <draw:line draw:style-name="gr1" draw:text-style-name="P1" draw:layer="layout" svg:x1="1.75cm" svg:y1="9.725cm" svg:x2="1.75cm" svg:y2="10.875cm">
          <text:p/>
        </draw:line>
        <draw:g draw:style-name="gr2">
          <draw:g draw:style-name="gr3">
            <draw:polygon draw:style-name="gr4" draw:text-style-name="P2" draw:layer="layout" svg:width="2.5cm" svg:height="1.25cm" svg:x="0.5cm" svg:y="8.475cm" svg:viewBox="0 0 2501 1251" draw:points="0,0 2501,0 2501,1251 0,1251">
              <text:p/>
            </draw:polygon>
            <draw:polygon draw:style-name="gr5" draw:text-style-name="P1" draw:layer="layout" svg:width="2.5cm" svg:height="1.25cm" svg:x="0.5cm" svg:y="8.475cm" svg:viewBox="0 0 2501 1251" draw:points="0,0 2501,0 2501,1251 0,1251">
              <text:p/>
            </draw:polygon>
          </draw:g>
          <draw:frame draw:style-name="gr6" draw:text-style-name="P1" draw:layer="layout" svg:width="2.54cm" svg:height="2.54cm" svg:x="0.48cm" svg:y="7.83cm">
            <draw:text-box>
              <text:p text:style-name="P3"><text:span text:style-name="T1">Создание поездки</text:span></text:p>
            </draw:text-box>
          </draw:frame>
        </draw:g>
        <draw:polyline draw:style-name="gr1" draw:text-style-name="P1" draw:layer="layout" svg:width="0cm" svg:height="0.973cm" svg:x="1.75cm" svg:y="12.125cm" svg:viewBox="0 0 0 974" draw:points="0,0 0,499 0,475 0,974">
          <text:p/>
        </draw:polyline>
        <draw:g draw:style-name="gr2">
          <draw:g draw:style-name="gr3">
            <draw:polygon draw:style-name="gr4" draw:text-style-name="P2" draw:layer="layout" svg:width="2.5cm" svg:height="1.25cm" svg:x="0.5cm" svg:y="10.875cm" svg:viewBox="0 0 2501 1251" draw:points="0,0 2501,0 2501,1251 0,1251">
              <text:p/>
            </draw:polygon>
            <draw:polygon draw:style-name="gr5" draw:text-style-name="P1" draw:layer="layout" svg:width="2.5cm" svg:height="1.25cm" svg:x="0.5cm" svg:y="10.875cm" svg:viewBox="0 0 2501 1251" draw:points="0,0 2501,0 2501,1251 0,1251">
              <text:p/>
            </draw:polygon>
          </draw:g>
          <draw:frame draw:style-name="gr6" draw:text-style-name="P1" draw:layer="layout" svg:width="2.54cm" svg:height="2.54cm" svg:x="0.48cm" svg:y="10.23cm">
            <draw:text-box>
              <text:p text:style-name="P3"><text:span text:style-name="T1">Поиск водителя</text:span></text:p>
            </draw:text-box>
          </draw:frame>
        </draw:g>
        <draw:line draw:style-name="gr1" draw:text-style-name="P1" draw:layer="layout" svg:x1="1.75cm" svg:y1="14.35cm" svg:x2="1.75cm" svg:y2="15.75cm">
          <text:p/>
        </draw:line>
        <draw:g draw:style-name="gr2">
          <draw:g draw:style-name="gr3">
            <draw:polygon draw:style-name="gr4" draw:text-style-name="P2" draw:layer="layout" svg:width="2.5cm" svg:height="1.25cm" svg:x="0.5cm" svg:y="13.1cm" svg:viewBox="0 0 2501 1251" draw:points="0,0 2501,0 2501,1251 0,1251">
              <text:p/>
            </draw:polygon>
            <draw:polygon draw:style-name="gr5" draw:text-style-name="P1" draw:layer="layout" svg:width="2.5cm" svg:height="1.25cm" svg:x="0.5cm" svg:y="13.1cm" svg:viewBox="0 0 2501 1251" draw:points="0,0 2501,0 2501,1251 0,1251">
              <text:p/>
            </draw:polygon>
          </draw:g>
          <draw:frame draw:style-name="gr6" draw:text-style-name="P1" draw:layer="layout" svg:width="2.54cm" svg:height="2.54cm" svg:x="0.48cm" svg:y="12.455cm">
            <draw:text-box>
              <text:p text:style-name="P3"><text:span text:style-name="T1">Назначение водителя</text:span></text:p>
            </draw:text-box>
          </draw:frame>
        </draw:g>
        <draw:g draw:style-name="gr3">
          <draw:polyline draw:style-name="gr1" draw:text-style-name="P1" draw:layer="layout" svg:width="1.288cm" svg:height="3.4cm" svg:x="3cm" svg:y="13.725cm" svg:viewBox="0 0 1289 3401" draw:points="149,3401 1289,3401 1289,0 0,0">
            <text:p/>
          </draw:polyline>
          <draw:frame draw:style-name="gr7" draw:text-style-name="P1" draw:layer="layout" svg:width="2.54cm" svg:height="2.54cm" svg:x="3.018cm" svg:y="14.068cm">
            <draw:text-box>
              <text:p text:style-name="P3"><text:span text:style-name="T2">нет</text:span></text:p>
            </draw:text-box>
          </draw:frame>
        </draw:g>
        <draw:g draw:style-name="gr3">
          <draw:line draw:style-name="gr1" draw:text-style-name="P1" draw:layer="layout" svg:x1="1.75cm" svg:y1="18.5cm" svg:x2="1.75cm" svg:y2="19.999cm">
            <text:p/>
          </draw:line>
          <draw:frame draw:style-name="gr7" draw:text-style-name="P1" draw:layer="layout" svg:width="2.54cm" svg:height="2.54cm" svg:x="0.48cm" svg:y="17.98cm">
            <draw:text-box>
              <text:p text:style-name="P3"><text:span text:style-name="T2">да</text:span></text:p>
            </draw:text-box>
          </draw:frame>
        </draw:g>
        <draw:g draw:style-name="gr2">
          <draw:g draw:style-name="gr3">
            <draw:polygon draw:style-name="gr4" draw:text-style-name="P2" draw:layer="layout" svg:width="2.8cm" svg:height="2.75cm" svg:x="0.35cm" svg:y="15.75cm" svg:viewBox="0 0 2801 2751" draw:points="1401,0 2801,1376 1401,2751 0,1376">
              <text:p/>
            </draw:polygon>
            <draw:polygon draw:style-name="gr5" draw:text-style-name="P1" draw:layer="layout" svg:width="2.8cm" svg:height="2.75cm" svg:x="0.35cm" svg:y="15.75cm" svg:viewBox="0 0 2801 2751" draw:points="1401,0 2801,1376 1401,2751 0,1376">
              <text:p/>
            </draw:polygon>
          </draw:g>
          <draw:frame draw:style-name="gr6" draw:text-style-name="P1" draw:layer="layout" svg:width="2.54cm" svg:height="2.54cm" svg:x="0.48cm" svg:y="15.855cm">
            <draw:text-box>
              <text:p text:style-name="P3"><text:span text:style-name="T1">Водитель принял заказ?</text:span></text:p>
            </draw:text-box>
          </draw:frame>
        </draw:g>
        <draw:line draw:style-name="gr1" draw:text-style-name="P1" draw:layer="layout" svg:x1="1.75cm" svg:y1="21.25cm" svg:x2="1.75cm" svg:y2="22.424cm">
          <text:p/>
        </draw:line>
        <draw:g draw:style-name="gr2">
          <draw:g draw:style-name="gr3">
            <draw:polygon draw:style-name="gr4" draw:text-style-name="P2" draw:layer="layout" svg:width="2.5cm" svg:height="1.25cm" svg:x="0.5cm" svg:y="20cm" svg:viewBox="0 0 2501 1251" draw:points="0,0 2501,0 2501,1251 0,1251">
              <text:p/>
            </draw:polygon>
            <draw:polygon draw:style-name="gr5" draw:text-style-name="P1" draw:layer="layout" svg:width="2.5cm" svg:height="1.25cm" svg:x="0.5cm" svg:y="20cm" svg:viewBox="0 0 2501 1251" draw:points="0,0 2501,0 2501,1251 0,1251">
              <text:p/>
            </draw:polygon>
          </draw:g>
          <draw:frame draw:style-name="gr6" draw:text-style-name="P1" draw:layer="layout" svg:width="2.54cm" svg:height="2.54cm" svg:x="0.48cm" svg:y="19.355cm">
            <draw:text-box>
              <text:p text:style-name="P3"><text:span text:style-name="T1">Ожидание водителя</text:span></text:p>
            </draw:text-box>
          </draw:frame>
        </draw:g>
        <draw:g draw:style-name="gr3">
          <draw:polyline draw:style-name="gr1" draw:text-style-name="P1" draw:layer="layout" svg:width="1.2cm" svg:height="3.125cm" svg:x="3.05cm" svg:y="20.675cm" svg:viewBox="0 0 1201 3126" draw:points="99,3126 1201,3126 1201,0 0,0">
            <text:p/>
          </draw:polyline>
          <draw:frame draw:style-name="gr7" draw:text-style-name="P1" draw:layer="layout" svg:width="2.54cm" svg:height="2.54cm" svg:x="2.98cm" svg:y="20.905cm">
            <draw:text-box>
              <text:p text:style-name="P3"><text:span text:style-name="T2">нет</text:span></text:p>
            </draw:text-box>
          </draw:frame>
        </draw:g>
        <draw:g draw:style-name="gr3">
          <draw:line draw:style-name="gr1" draw:text-style-name="P1" draw:layer="layout" svg:x1="1.75cm" svg:y1="25.175cm" svg:x2="1.75cm" svg:y2="26.574cm">
            <text:p/>
          </draw:line>
          <draw:frame draw:style-name="gr7" draw:text-style-name="P1" draw:layer="layout" svg:width="2.54cm" svg:height="2.54cm" svg:x="0.48cm" svg:y="24.605cm">
            <draw:text-box>
              <text:p text:style-name="P3"><text:span text:style-name="T2">да</text:span></text:p>
            </draw:text-box>
          </draw:frame>
        </draw:g>
        <draw:g draw:style-name="gr2">
          <draw:g draw:style-name="gr3">
            <draw:polygon draw:style-name="gr4" draw:text-style-name="P2" draw:layer="layout" svg:width="2.8cm" svg:height="2.75cm" svg:x="0.35cm" svg:y="22.425cm" svg:viewBox="0 0 2801 2751" draw:points="1401,0 2801,1376 1401,2751 0,1376">
              <text:p/>
            </draw:polygon>
            <draw:polygon draw:style-name="gr5" draw:text-style-name="P1" draw:layer="layout" svg:width="2.8cm" svg:height="2.75cm" svg:x="0.35cm" svg:y="22.425cm" svg:viewBox="0 0 2801 2751" draw:points="1401,0 2801,1376 1401,2751 0,1376">
              <text:p/>
            </draw:polygon>
          </draw:g>
          <draw:frame draw:style-name="gr6" draw:text-style-name="P1" draw:layer="layout" svg:width="2.54cm" svg:height="2.54cm" svg:x="0.48cm" svg:y="22.53cm">
            <draw:text-box>
              <text:p text:style-name="P3"><text:span text:style-name="T1">Водитель прибыл?</text:span></text:p>
            </draw:text-box>
          </draw:frame>
        </draw:g>
        <draw:line draw:style-name="gr1" draw:text-style-name="P1" draw:layer="layout" svg:x1="12.35cm" svg:y1="6cm" svg:x2="12.35cm" svg:y2="7.749cm">
          <text:p/>
        </draw:line>
        <draw:g draw:style-name="gr2">
          <draw:g draw:style-name="gr3">
            <draw:polygon draw:style-name="gr4" draw:text-style-name="P2" draw:layer="layout" svg:width="2.5cm" svg:height="1.25cm" svg:x="11.1cm" svg:y="4.75cm" svg:viewBox="0 0 2501 1251" draw:points="0,0 2501,0 2501,1251 0,1251">
              <text:p/>
            </draw:polygon>
            <draw:polygon draw:style-name="gr5" draw:text-style-name="P1" draw:layer="layout" svg:width="2.5cm" svg:height="1.25cm" svg:x="11.1cm" svg:y="4.75cm" svg:viewBox="0 0 2501 1251" draw:points="0,0 2501,0 2501,1251 0,1251">
              <text:p/>
            </draw:polygon>
          </draw:g>
          <draw:frame draw:style-name="gr6" draw:text-style-name="P1" draw:layer="layout" svg:width="2.54cm" svg:height="2.54cm" svg:x="11.08cm" svg:y="4.105cm">
            <draw:text-box>
              <text:p text:style-name="P3"><text:span text:style-name="T1">Начало поездки</text:span></text:p>
            </draw:text-box>
          </draw:frame>
        </draw:g>
        <draw:line draw:style-name="gr1" draw:text-style-name="P1" draw:layer="layout" svg:x1="12.35cm" svg:y1="9cm" svg:x2="12.35cm" svg:y2="10.5cm">
          <text:p/>
        </draw:line>
        <draw:g draw:style-name="gr2">
          <draw:g draw:style-name="gr3">
            <draw:polygon draw:style-name="gr4" draw:text-style-name="P2" draw:layer="layout" svg:width="2.675cm" svg:height="1.25cm" svg:x="11.012cm" svg:y="7.75cm" svg:viewBox="0 0 2676 1251" draw:points="0,0 2676,0 2676,1251 0,1251">
              <text:p/>
            </draw:polygon>
            <draw:polygon draw:style-name="gr5" draw:text-style-name="P1" draw:layer="layout" svg:width="2.675cm" svg:height="1.25cm" svg:x="11.012cm" svg:y="7.75cm" svg:viewBox="0 0 2676 1251" draw:points="0,0 2676,0 2676,1251 0,1251">
              <text:p/>
            </draw:polygon>
          </draw:g>
          <draw:frame draw:style-name="gr6" draw:text-style-name="P1" draw:layer="layout" svg:width="2.54cm" svg:height="2.54cm" svg:x="11.08cm" svg:y="7.105cm">
            <draw:text-box>
              <text:p text:style-name="P3"><text:span text:style-name="T1">Водитель прибывает к точке назначения</text:span></text:p>
            </draw:text-box>
          </draw:frame>
        </draw:g>
        <draw:line draw:style-name="gr1" draw:text-style-name="P1" draw:layer="layout" svg:x1="12.35cm" svg:y1="11.75cm" svg:x2="12.35cm" svg:y2="13.324cm">
          <text:p/>
        </draw:line>
        <draw:g draw:style-name="gr2">
          <draw:g draw:style-name="gr3">
            <draw:polygon draw:style-name="gr4" draw:text-style-name="P2" draw:layer="layout" svg:width="2.5cm" svg:height="1.25cm" svg:x="11.1cm" svg:y="10.5cm" svg:viewBox="0 0 2501 1251" draw:points="0,0 2501,0 2501,1251 0,1251">
              <text:p/>
            </draw:polygon>
            <draw:polygon draw:style-name="gr5" draw:text-style-name="P1" draw:layer="layout" svg:width="2.5cm" svg:height="1.25cm" svg:x="11.1cm" svg:y="10.5cm" svg:viewBox="0 0 2501 1251" draw:points="0,0 2501,0 2501,1251 0,1251">
              <text:p/>
            </draw:polygon>
          </draw:g>
          <draw:frame draw:style-name="gr6" draw:text-style-name="P1" draw:layer="layout" svg:width="2.54cm" svg:height="2.54cm" svg:x="11.08cm" svg:y="9.855cm">
            <draw:text-box>
              <text:p text:style-name="P3"><text:span text:style-name="T1">Завершение поездки</text:span></text:p>
            </draw:text-box>
          </draw:frame>
        </draw:g>
        <draw:polyline draw:style-name="gr1" draw:text-style-name="P1" draw:layer="layout" svg:width="0.012cm" svg:height="1.75cm" svg:x="12.338cm" svg:y="14.575cm" svg:viewBox="0 0 13 1751" draw:points="13,0 13,875 0,875 0,1751">
          <text:p/>
        </draw:polyline>
        <draw:g draw:style-name="gr2">
          <draw:g draw:style-name="gr3">
            <draw:polygon draw:style-name="gr4" draw:text-style-name="P2" draw:layer="layout" svg:width="2.5cm" svg:height="1.25cm" svg:x="11.1cm" svg:y="13.325cm" svg:viewBox="0 0 2501 1251" draw:points="0,0 2501,0 2501,1251 0,1251">
              <text:p/>
            </draw:polygon>
            <draw:polygon draw:style-name="gr5" draw:text-style-name="P1" draw:layer="layout" svg:width="2.5cm" svg:height="1.25cm" svg:x="11.1cm" svg:y="13.325cm" svg:viewBox="0 0 2501 1251" draw:points="0,0 2501,0 2501,1251 0,1251">
              <text:p/>
            </draw:polygon>
          </draw:g>
          <draw:frame draw:style-name="gr6" draw:text-style-name="P1" draw:layer="layout" svg:width="2.54cm" svg:height="2.54cm" svg:x="11.08cm" svg:y="12.68cm">
            <draw:text-box>
              <text:p text:style-name="P3"><text:span text:style-name="T1">Запрос оценки поездки</text:span></text:p>
            </draw:text-box>
          </draw:frame>
        </draw:g>
        <draw:g draw:style-name="gr2">
          <draw:g draw:style-name="gr3">
            <draw:polygon draw:style-name="gr4" draw:text-style-name="P2" draw:layer="layout" svg:width="1.875cm" svg:height="0.75cm" svg:x="14.937cm" svg:y="24.275cm" svg:viewBox="0 0 1876 751" draw:points="0,0 1876,0 1876,751 0,751">
              <text:p/>
            </draw:polygon>
            <draw:polygon draw:style-name="gr5" draw:text-style-name="P1" draw:layer="layout" svg:width="1.875cm" svg:height="0.75cm" svg:x="14.937cm" svg:y="24.275cm" svg:viewBox="0 0 1876 751" draw:points="0,0 1876,0 1876,751 0,751">
              <text:p/>
            </draw:polygon>
          </draw:g>
          <draw:frame draw:style-name="gr6" draw:text-style-name="P1" draw:layer="layout" svg:width="2.54cm" svg:height="2.54cm" svg:x="14.605cm" svg:y="23.38cm">
            <draw:text-box>
              <text:p text:style-name="P3"><text:span text:style-name="T1">Конец</text:span></text:p>
            </draw:text-box>
          </draw:frame>
        </draw:g>
        <draw:g draw:style-name="gr3">
          <draw:polyline draw:style-name="gr1" draw:text-style-name="P1" draw:layer="layout" svg:width="0.012cm" svg:height="1.6cm" svg:x="12.338cm" svg:y="19.075cm" svg:viewBox="0 0 13 1601" draw:points="0,0 0,801 13,801 13,1601">
            <text:p/>
          </draw:polyline>
          <draw:frame draw:style-name="gr7" draw:text-style-name="P1" draw:layer="layout" svg:width="2.54cm" svg:height="2.54cm" svg:x="11.068cm" svg:y="18.605cm">
            <draw:text-box>
              <text:p text:style-name="P3"><text:span text:style-name="T2">да</text:span></text:p>
            </draw:text-box>
          </draw:frame>
        </draw:g>
        <draw:g draw:style-name="gr3">
          <draw:polyline draw:style-name="gr1" draw:text-style-name="P1" draw:layer="layout" svg:width="2.537cm" svg:height="6.575cm" svg:x="13.338cm" svg:y="17.7cm" svg:viewBox="0 0 2538 6576" draw:points="0,0 2538,12 2538,6576">
            <text:p/>
          </draw:polyline>
          <draw:frame draw:style-name="gr7" draw:text-style-name="P1" draw:layer="layout" svg:width="2.54cm" svg:height="2.54cm" svg:x="14.605cm" svg:y="18.455cm">
            <draw:text-box>
              <text:p text:style-name="P3"><text:span text:style-name="T2">нет</text:span></text:p>
            </draw:text-box>
          </draw:frame>
        </draw:g>
        <draw:g draw:style-name="gr2">
          <draw:g draw:style-name="gr3">
            <draw:polygon draw:style-name="gr4" draw:text-style-name="P2" draw:layer="layout" svg:width="2.8cm" svg:height="2.75cm" svg:x="10.937cm" svg:y="16.325cm" svg:viewBox="0 0 2801 2751" draw:points="1400,0 2801,1376 1400,2751 0,1376">
              <text:p/>
            </draw:polygon>
            <draw:polygon draw:style-name="gr5" draw:text-style-name="P1" draw:layer="layout" svg:width="2.8cm" svg:height="2.75cm" svg:x="10.937cm" svg:y="16.325cm" svg:viewBox="0 0 2801 2751" draw:points="1400,0 2801,1376 1400,2751 0,1376">
              <text:p/>
            </draw:polygon>
          </draw:g>
          <draw:frame draw:style-name="gr6" draw:text-style-name="P1" draw:layer="layout" svg:width="2.54cm" svg:height="2.54cm" svg:x="11.068cm" svg:y="16.43cm">
            <draw:text-box>
              <text:p text:style-name="P3"><text:span text:style-name="T1">Оценка добалена?</text:span></text:p>
            </draw:text-box>
          </draw:frame>
        </draw:g>
        <draw:polyline draw:style-name="gr1" draw:text-style-name="P1" draw:layer="layout" svg:width="2.587cm" svg:height="2.725cm" svg:x="12.35cm" svg:y="21.925cm" svg:viewBox="0 0 2588 2726" draw:points="0,0 0,2726 2588,2726">
          <text:p/>
        </draw:polyline>
        <draw:g draw:style-name="gr2">
          <draw:g draw:style-name="gr3">
            <draw:polygon draw:style-name="gr4" draw:text-style-name="P2" draw:layer="layout" svg:width="2.5cm" svg:height="1.25cm" svg:x="11.1cm" svg:y="20.675cm" svg:viewBox="0 0 2501 1251" draw:points="0,0 2501,0 2501,1251 0,1251">
              <text:p/>
            </draw:polygon>
            <draw:polygon draw:style-name="gr5" draw:text-style-name="P1" draw:layer="layout" svg:width="2.5cm" svg:height="1.25cm" svg:x="11.1cm" svg:y="20.675cm" svg:viewBox="0 0 2501 1251" draw:points="0,0 2501,0 2501,1251 0,1251">
              <text:p/>
            </draw:polygon>
          </draw:g>
          <draw:frame draw:style-name="gr6" draw:text-style-name="P1" draw:layer="layout" svg:width="2.54cm" svg:height="2.54cm" svg:x="11.08cm" svg:y="20.03cm">
            <draw:text-box>
              <text:p text:style-name="P3"><text:span text:style-name="T1">Сохранение оценки</text:span></text:p>
            </draw:text-box>
          </draw:frame>
        </draw:g>
        <draw:g draw:style-name="gr3">
          <draw:path draw:style-name="gr4" draw:text-style-name="P2" draw:layer="layout" svg:width="0.75cm" svg:height="0.75cm" svg:x="1.375cm" svg:y="26.575cm" svg:viewBox="0 0 751 751" svg:d="M0 376c0-66 17-131 50-188s81-105 138-138 122-50 187-50c66 0 131 17 188 50s105 81 138 138 50 122 50 187c0 66-17 131-50 188s-81 105-138 138-122 50-187 50c-66 0-131-17-188-50s-105-81-138-138-50-122-50-187z">
            <text:p/>
          </draw:path>
          <draw:path draw:style-name="gr5" draw:text-style-name="P1" draw:layer="layout" svg:width="0.75cm" svg:height="0.75cm" svg:x="1.375cm" svg:y="26.575cm" svg:viewBox="0 0 751 751" svg:d="M0 376c0-66 17-131 50-188s81-105 138-138 122-50 187-50c66 0 131 17 188 50s105 81 138 138 50 122 50 187c0 66-17 131-50 188s-81 105-138 138-122 50-187 50c-66 0-131-17-188-50s-105-81-138-138-50-122-50-187z">
            <text:p/>
          </draw:path>
        </draw:g>
        <draw:line draw:style-name="gr1" draw:text-style-name="P1" draw:layer="layout" svg:x1="12.35cm" svg:y1="3.25cm" svg:x2="12.35cm" svg:y2="4.75cm">
          <text:p/>
        </draw:line>
        <draw:g draw:style-name="gr3">
          <draw:path draw:style-name="gr4" draw:text-style-name="P2" draw:layer="layout" svg:width="0.75cm" svg:height="0.75cm" svg:x="11.975cm" svg:y="2.5cm" svg:viewBox="0 0 751 751" svg:d="M0 376c0-66 17-131 50-188s81-105 138-138 122-50 187-50c66 0 131 17 188 50s105 81 138 138 50 122 50 187c0 66-17 131-50 188s-81 105-138 138-122 50-187 50c-66 0-131-17-188-50s-105-81-138-138-50-122-50-187z">
            <text:p/>
          </draw:path>
          <draw:path draw:style-name="gr5" draw:text-style-name="P1" draw:layer="layout" svg:width="0.75cm" svg:height="0.75cm" svg:x="11.975cm" svg:y="2.5cm" svg:viewBox="0 0 751 751" svg:d="M0 376c0-66 17-131 50-188s81-105 138-138 122-50 187-50c66 0 131 17 188 50s105 81 138 138 50 122 50 187c0 66-17 131-50 188s-81 105-138 138-122 50-187 50c-66 0-131-17-188-50s-105-81-138-138-50-122-50-187z">
            <text:p/>
          </draw:path>
        </draw:g>
      </draw:page>
    </office:drawing>
  </office:body>
</office:document-content>
</file>

<file path=Object 2/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arker_5f_0" draw:display-name="Marker_0" svg:viewBox="0 0 20 20" svg:d="M10 0l-10 20c7-3 13-3 20 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25cm" fo:page-height="2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